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Heading2" style:master-page-name="MP0" style:family="paragraph">
      <style:paragraph-properties fo:break-before="page"/>
    </style:style>
    <style:style style:name="P2" style:parent-style-name="Textbody" style:family="paragraph"/>
    <style:style style:name="P3" style:parent-style-name="Textbody" style:family="paragraph"/>
    <style:style style:name="P4" style:parent-style-name="Textbody" style:family="paragraph"/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P17" style:parent-style-name="Textbody" style:family="paragraph"/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/>
    <style:style style:name="P21" style:parent-style-name="Textbody" style:family="paragraph"/>
    <style:style style:name="P22" style:parent-style-name="Textbody" style:family="paragraph"/>
    <style:style style:name="P23" style:parent-style-name="Textbody" style:family="paragraph"/>
    <style:style style:name="P24" style:parent-style-name="Textbody" style:family="paragraph"/>
    <style:style style:name="P25" style:parent-style-name="Textbody" style:family="paragraph"/>
    <style:style style:name="P26" style:parent-style-name="Textbody" style:family="paragraph"/>
    <style:style style:name="P27" style:parent-style-name="Textbody" style:family="paragraph"/>
    <style:style style:name="P28" style:parent-style-name="Textbody" style:family="paragraph"/>
    <style:style style:name="P29" style:parent-style-name="Textbody" style:family="paragraph"/>
    <style:style style:name="P30" style:parent-style-name="Textbody" style:family="paragraph"/>
    <style:style style:name="P31" style:parent-style-name="Textbody" style:family="paragraph"/>
    <style:style style:name="P32" style:parent-style-name="Textbody" style:family="paragraph"/>
    <style:style style:name="P33" style:parent-style-name="Textbody" style:family="paragraph"/>
    <style:style style:name="P34" style:parent-style-name="Textbody" style:family="paragraph"/>
    <style:style style:name="P35" style:parent-style-name="Textbody" style:family="paragraph"/>
    <style:style style:name="P36" style:parent-style-name="Textbody" style:family="paragraph"/>
    <style:style style:name="P37" style:parent-style-name="PreformattedText" style:family="paragraph">
      <style:paragraph-properties fo:margin-bottom="0.1965in"/>
    </style:style>
    <style:style style:name="P38" style:parent-style-name="PreformattedText" style:family="paragraph">
      <style:paragraph-properties fo:margin-bottom="0.1965in"/>
    </style:style>
    <style:style style:name="P39" style:parent-style-name="PreformattedText" style:family="paragraph">
      <style:paragraph-properties fo:margin-bottom="0.1965in"/>
    </style:style>
    <style:style style:name="P40" style:parent-style-name="PreformattedText" style:family="paragraph">
      <style:paragraph-properties fo:margin-bottom="0.1965in"/>
    </style:style>
    <style:style style:name="P41" style:parent-style-name="PreformattedText" style:family="paragraph">
      <style:paragraph-properties fo:margin-bottom="0.1965in"/>
    </style:style>
    <style:style style:name="P42" style:parent-style-name="PreformattedText" style:family="paragraph">
      <style:paragraph-properties fo:margin-bottom="0.1965in"/>
    </style:style>
    <style:style style:name="P43" style:parent-style-name="Textbody" style:family="paragraph"/>
    <style:style style:name="P44" style:parent-style-name="Textbody" style:family="paragraph"/>
    <style:style style:name="P45" style:parent-style-name="Textbody" style:family="paragraph"/>
    <style:style style:name="P46" style:parent-style-name="Textbody" style:family="paragraph"/>
    <style:style style:name="P47" style:parent-style-name="Textbody" style:family="paragraph"/>
    <style:style style:name="P48" style:parent-style-name="Textbody" style:family="paragraph"/>
    <style:style style:name="P49" style:parent-style-name="Textbody" style:family="paragraph"/>
    <style:style style:name="P50" style:parent-style-name="Textbody" style:family="paragraph"/>
    <style:style style:name="P51" style:parent-style-name="Textbody" style:family="paragraph"/>
    <style:style style:name="P52" style:parent-style-name="Textbody" style:family="paragraph"/>
    <style:style style:name="P53" style:parent-style-name="Textbody" style:family="paragraph"/>
    <style:style style:name="P54" style:parent-style-name="PreformattedText" style:family="paragraph">
      <style:paragraph-properties fo:margin-bottom="0.1965in"/>
    </style:style>
    <style:style style:name="P55" style:parent-style-name="PreformattedText" style:family="paragraph">
      <style:paragraph-properties fo:margin-bottom="0.1965in"/>
    </style:style>
    <style:style style:name="P56" style:parent-style-name="Textbody" style:family="paragraph"/>
    <style:style style:name="P57" style:parent-style-name="Textbody" style:family="paragraph"/>
    <style:style style:name="P58" style:parent-style-name="Textbody" style:family="paragraph"/>
    <style:style style:name="P59" style:parent-style-name="Textbody" style:family="paragraph"/>
    <style:style style:name="P60" style:parent-style-name="Textbody" style:family="paragraph"/>
    <style:style style:name="P61" style:parent-style-name="PreformattedText" style:family="paragraph">
      <style:paragraph-properties fo:margin-bottom="0.1965in"/>
    </style:style>
    <style:style style:name="P62" style:parent-style-name="Textbody" style:family="paragraph"/>
    <style:style style:name="P63" style:parent-style-name="Textbody" style:family="paragraph"/>
    <style:style style:name="P64" style:parent-style-name="Textbody" style:family="paragraph"/>
    <style:style style:name="P65" style:parent-style-name="Textbody" style:family="paragraph"/>
    <style:style style:name="P66" style:parent-style-name="Textbody" style:family="paragraph"/>
    <style:style style:name="P67" style:parent-style-name="Textbody" style:family="paragraph"/>
    <style:style style:name="P68" style:parent-style-name="Textbody" style:family="paragraph"/>
    <style:style style:name="P69" style:parent-style-name="Textbody" style:family="paragraph"/>
    <style:style style:name="P70" style:parent-style-name="Textbody" style:family="paragraph"/>
    <style:style style:name="P71" style:parent-style-name="Textbody" style:family="paragraph"/>
    <style:style style:name="P72" style:parent-style-name="PreformattedText" style:family="paragraph">
      <style:paragraph-properties fo:margin-bottom="0.1965in"/>
    </style:style>
    <style:style style:name="P73" style:parent-style-name="Textbody" style:family="paragraph"/>
    <style:style style:name="P74" style:parent-style-name="Textbody" style:family="paragraph"/>
    <style:style style:name="P75" style:parent-style-name="Textbody" style:family="paragraph"/>
    <style:style style:name="P76" style:parent-style-name="PreformattedText" style:family="paragraph">
      <style:paragraph-properties fo:margin-bottom="0.1965in"/>
    </style:style>
    <style:style style:name="P77" style:parent-style-name="PreformattedText" style:family="paragraph">
      <style:paragraph-properties fo:margin-bottom="0.1965in"/>
    </style:style>
    <style:style style:name="P78" style:parent-style-name="Textbody" style:family="paragraph"/>
    <style:style style:name="P79" style:parent-style-name="Textbody" style:family="paragraph"/>
    <style:style style:name="P80" style:parent-style-name="Textbody" style:family="paragraph"/>
    <style:style style:name="P81" style:parent-style-name="Textbody" style:family="paragraph"/>
    <style:style style:name="P82" style:parent-style-name="Textbody" style:family="paragraph"/>
    <style:style style:name="P83" style:parent-style-name="Textbody" style:family="paragraph"/>
    <style:style style:name="P84" style:parent-style-name="Textbody" style:family="paragraph"/>
    <style:style style:name="P85" style:parent-style-name="Textbody" style:family="paragraph"/>
    <style:style style:name="P86" style:parent-style-name="PreformattedText" style:family="paragraph">
      <style:paragraph-properties fo:margin-bottom="0.1965in"/>
    </style:style>
    <style:style style:name="P87" style:parent-style-name="PreformattedText" style:family="paragraph">
      <style:paragraph-properties fo:margin-bottom="0.1965in"/>
    </style:style>
    <style:style style:name="P88" style:parent-style-name="Textbody" style:family="paragraph"/>
    <style:style style:name="P89" style:parent-style-name="Textbody" style:family="paragraph"/>
    <style:style style:name="P90" style:parent-style-name="Textbody" style:family="paragraph"/>
    <style:style style:name="P91" style:parent-style-name="PreformattedText" style:family="paragraph">
      <style:paragraph-properties fo:margin-bottom="0.1965in"/>
    </style:style>
    <style:style style:name="P92" style:parent-style-name="PreformattedText" style:family="paragraph">
      <style:paragraph-properties fo:margin-bottom="0.1965in"/>
    </style:style>
    <style:style style:name="P93" style:parent-style-name="Textbody" style:family="paragraph"/>
    <style:style style:name="P94" style:parent-style-name="Textbody" style:family="paragraph"/>
    <style:style style:name="P95" style:parent-style-name="Textbody" style:family="paragraph"/>
    <style:style style:name="P96" style:parent-style-name="PreformattedText" style:family="paragraph">
      <style:paragraph-properties fo:margin-bottom="0.1965in"/>
    </style:style>
    <style:style style:name="P97" style:parent-style-name="PreformattedText" style:family="paragraph">
      <style:paragraph-properties fo:margin-bottom="0.1965in"/>
    </style:style>
    <style:style style:name="P98" style:parent-style-name="Textbody" style:family="paragraph"/>
    <style:style style:name="P99" style:parent-style-name="Textbody" style:family="paragraph"/>
    <style:style style:name="P100" style:parent-style-name="Textbody" style:family="paragraph"/>
    <style:style style:name="P101" style:parent-style-name="PreformattedText" style:family="paragraph">
      <style:paragraph-properties fo:margin-bottom="0.1965in"/>
    </style:style>
    <style:style style:name="P102" style:parent-style-name="PreformattedText" style:family="paragraph">
      <style:paragraph-properties fo:margin-bottom="0.1965in"/>
    </style:style>
    <style:style style:name="P103" style:parent-style-name="PreformattedText" style:family="paragraph">
      <style:paragraph-properties fo:margin-bottom="0.1965in"/>
    </style:style>
    <style:style style:name="P104" style:parent-style-name="PreformattedText" style:family="paragraph">
      <style:paragraph-properties fo:margin-bottom="0.1965in"/>
    </style:style>
    <style:style style:name="P105" style:parent-style-name="PreformattedText" style:family="paragraph">
      <style:paragraph-properties fo:margin-bottom="0.1965in"/>
    </style:style>
    <style:style style:name="P106" style:parent-style-name="PreformattedText" style:family="paragraph">
      <style:paragraph-properties fo:margin-bottom="0.1965in"/>
    </style:style>
    <style:style style:name="P107" style:parent-style-name="PreformattedText" style:family="paragraph">
      <style:paragraph-properties fo:margin-bottom="0.1965in"/>
    </style:style>
    <style:style style:name="P108" style:parent-style-name="PreformattedText" style:family="paragraph">
      <style:paragraph-properties fo:margin-bottom="0.1965in"/>
    </style:style>
    <style:style style:name="P109" style:parent-style-name="Textbody" style:family="paragraph"/>
    <style:style style:name="P110" style:parent-style-name="Textbody" style:family="paragraph"/>
    <style:style style:name="P111" style:parent-style-name="Textbody" style:family="paragraph"/>
    <style:style style:name="P112" style:parent-style-name="Textbody" style:family="paragraph"/>
    <style:style style:name="P113" style:parent-style-name="PreformattedText" style:family="paragraph">
      <style:paragraph-properties fo:margin-bottom="0.1965in"/>
    </style:style>
    <style:style style:name="P114" style:parent-style-name="PreformattedText" style:family="paragraph">
      <style:paragraph-properties fo:margin-bottom="0.1965in"/>
    </style:style>
    <style:style style:name="P115" style:parent-style-name="PreformattedText" style:family="paragraph">
      <style:paragraph-properties fo:margin-bottom="0.1965in"/>
    </style:style>
    <style:style style:name="P116" style:parent-style-name="PreformattedText" style:family="paragraph">
      <style:paragraph-properties fo:margin-bottom="0.1965in"/>
    </style:style>
    <style:style style:name="P117" style:parent-style-name="PreformattedText" style:family="paragraph">
      <style:paragraph-properties fo:margin-bottom="0.1965in"/>
    </style:style>
    <style:style style:name="P118" style:parent-style-name="PreformattedText" style:family="paragraph">
      <style:paragraph-properties fo:margin-bottom="0.1965in"/>
    </style:style>
    <style:style style:name="P119" style:parent-style-name="PreformattedText" style:family="paragraph">
      <style:paragraph-properties fo:margin-bottom="0.1965in"/>
    </style:style>
    <style:style style:name="P120" style:parent-style-name="PreformattedText" style:family="paragraph">
      <style:paragraph-properties fo:margin-bottom="0.1965in"/>
    </style:style>
    <style:style style:name="P121" style:parent-style-name="PreformattedText" style:family="paragraph">
      <style:paragraph-properties fo:margin-bottom="0.1965in"/>
    </style:style>
    <style:style style:name="P122" style:parent-style-name="PreformattedText" style:family="paragraph">
      <style:paragraph-properties fo:margin-bottom="0.1965in"/>
    </style:style>
    <style:style style:name="P123" style:parent-style-name="PreformattedText" style:family="paragraph">
      <style:paragraph-properties fo:margin-bottom="0.1965in"/>
    </style:style>
  </office:automatic-styles>
  <office:body>
    <office:text text:use-soft-page-breaks="true">
      <text:h text:style-name="P1" text:outline-level="2">Câu 1</text:h>
      <text:p text:style-name="Quotations">Nhóm nên ưu tiên ba loại nguy cơ nào?</text:p>
      <text:p text:style-name="Textbody">Mình sẽ chốt luôn:</text:p>
      <text:list text:style-name="LFO1" text:continue-numbering="true">
        <text:list-item>
          <text:p text:style-name="P2">Mưa lớn</text:p>
        </text:list-item>
        <text:list-item>
          <text:p text:style-name="P3">Lũ quét</text:p>
        </text:list-item>
        <text:list-item>
          <text:p text:style-name="P4">Rét đậm / sương giá</text:p>
        </text:list-item>
      </text:list>
      <text:p text:style-name="Textbody">Lý do</text:p>
      <text:list text:style-name="LFO2" text:continue-numbering="true">
        <text:list-item>
          <text:p text:style-name="P5">Điện Biên gặp nhiều</text:p>
        </text:list-item>
        <text:list-item>
          <text:p text:style-name="P6">API đều có dữ liệu</text:p>
        </text:list-item>
        <text:list-item>
          <text:p text:style-name="P7">Rule đơn giản</text:p>
        </text:list-item>
        <text:list-item>
          <text:p text:style-name="P8">Demo dễ</text:p>
        </text:list-item>
      </text:list>
      <text:p text:style-name="Textbody">Không nên làm</text:p>
      <text:list text:style-name="LFO3" text:continue-numbering="true">
        <text:list-item>
          <text:p text:style-name="P9">sạt lở</text:p>
        </text:list-item>
        <text:list-item>
          <text:p text:style-name="P10">giông lốc</text:p>
        </text:list-item>
        <text:list-item>
          <text:p text:style-name="P11">mưa đá</text:p>
        </text:list-item>
      </text:list>
      <text:p text:style-name="Textbody">vì rất khó lấy ground truth.</text:p>
      <text:h text:style-name="Heading2" text:outline-level="2">Câu 2</text:h>
      <text:p text:style-name="Quotations">Độ chi tiết nên là gì?</text:p>
      <text:p text:style-name="Textbody">Nên chọn</text:p>
      <text:p text:style-name="Textbody"><text:span text:style-name="StrongEmphasis">3 tọa độ đại diện</text:span></text:p>
      <text:p text:style-name="Textbody">Ví dụ</text:p>
      <text:list text:style-name="LFO4" text:continue-numbering="true">
        <text:list-item>
          <text:p text:style-name="P12">TP Điện Biên</text:p>
        </text:list-item>
        <text:list-item>
          <text:p text:style-name="P13">Mường Chà</text:p>
        </text:list-item>
        <text:list-item>
          <text:p text:style-name="P14">Tủa Chùa</text:p>
        </text:list-item>
      </text:list>
      <text:p text:style-name="Textbody">Không nên làm từng xã.</text:p>
      <text:p text:style-name="Textbody">Lý do</text:p>
      <text:p text:style-name="Textbody">API forecast theo lat/lon.</text:p>
      <text:h text:style-name="Heading2" text:outline-level="2">Câu 3</text:h>
      <text:p text:style-name="Quotations">Có dữ liệu lịch sử không?</text:p>
      <text:soft-page-break/>
      <text:p text:style-name="Textbody">Giải pháp nhanh nhất:</text:p>
      <text:p text:style-name="Textbody">Nguồn chính</text:p>
      <text:p text:style-name="Textbody">Open-Meteo Archive</text:p>
      <text:p text:style-name="Textbody">Nguồn phụ</text:p>
      <text:p text:style-name="Textbody">NOAA</text:p>
      <text:p text:style-name="Textbody">ERA5</text:p>
      <text:p text:style-name="Textbody">Nếu mentor có dữ liệu trạm thì càng tốt.</text:p>
      <text:p text:style-name="Textbody">Không nên chờ dữ liệu trạm.</text:p>
      <text:h text:style-name="Heading2" text:outline-level="2">Câu 4</text:h>
      <text:p text:style-name="Quotations">Ngưỡng cảnh báo?</text:p>
      <text:p text:style-name="Textbody">Nên dùng luôn ngưỡng của</text:p>
      <text:list text:style-name="LFO5" text:continue-numbering="true">
        <text:list-item>
          <text:p text:style-name="P15">Trung tâm KTTV</text:p>
        </text:list-item>
        <text:list-item>
          <text:p text:style-name="P16">Ban chỉ huy PCTT</text:p>
        </text:list-item>
      </text:list>
      <text:p text:style-name="Textbody">Ví dụ</text:p>
      <text:p text:style-name="Textbody">Mưa</text:p>
      <text:list text:style-name="LFO6" text:continue-numbering="true">
        <text:list-item>
          <text:p text:style-name="P17">20mm</text:p>
        </text:list-item>
        <text:list-item>
          <text:p text:style-name="P18">50mm</text:p>
        </text:list-item>
        <text:list-item>
          <text:p text:style-name="P19">100mm</text:p>
        </text:list-item>
      </text:list>
      <text:p text:style-name="Textbody">Nhiệt độ</text:p>
      <text:list text:style-name="LFO7" text:continue-numbering="true">
        <text:list-item>
          <text:p text:style-name="P20">dưới 15</text:p>
        </text:list-item>
        <text:list-item>
          <text:p text:style-name="P21">dưới 10</text:p>
        </text:list-item>
        <text:list-item>
          <text:p text:style-name="P22">dưới 5</text:p>
        </text:list-item>
      </text:list>
      <text:p text:style-name="Textbody">Sau này chỉ cần đổi config.</text:p>
      <text:h text:style-name="Heading2" text:outline-level="2">Câu 5</text:h>
      <text:p text:style-name="Quotations">Tiếng Thái hay Mông?</text:p>
      <text:p text:style-name="Textbody">Theo mình</text:p>
      <text:p text:style-name="Textbody"><text:span text:style-name="StrongEmphasis">Tiếng Thái</text:span></text:p>
      <text:p text:style-name="Textbody">Lý do</text:p>
      <text:list text:style-name="LFO8" text:continue-numbering="true">
        <text:list-item>
          <text:p text:style-name="P23">phổ biến hơn</text:p>
        </text:list-item>
        <text:list-item>
          <text:p text:style-name="P24">dễ kiếm người kiểm chứng hơn</text:p>
        </text:list-item>
      </text:list>
      <text:soft-page-break/>
      <text:p text:style-name="Textbody">Nhưng demo chỉ cần</text:p>
      <text:p text:style-name="Textbody">Tiếng Việt</text:p>
      <text:p text:style-name="Textbody">↓</text:p>
      <text:p text:style-name="Textbody">dịch thử nghiệm</text:p>
      <text:p text:style-name="Textbody">↓</text:p>
      <text:p text:style-name="Textbody">ghi rõ</text:p>
      <text:p text:style-name="Textbody">"Machine Translation"</text:p>
      <text:p text:style-name="Textbody">Không nên khẳng định chính xác.</text:p>
      <text:h text:style-name="Heading2" text:outline-level="2">Câu 6</text:h>
      <text:p text:style-name="Quotations">Mentor kỳ vọng AI dự báo hay hệ thống?</text:p>
      <text:p text:style-name="Textbody">Theo mình</text:p>
      <text:p text:style-name="Textbody"><text:span text:style-name="StrongEmphasis">Không nên cạnh tranh với Open-Meteo.</text:span></text:p>
      <text:p text:style-name="Textbody">Vì</text:p>
      <text:p text:style-name="Textbody">Open-Meteo</text:p>
      <text:p text:style-name="Textbody">↓</text:p>
      <text:p text:style-name="Textbody">ECMWF</text:p>
      <text:p text:style-name="Textbody">↓</text:p>
      <text:p text:style-name="Textbody">siêu máy tính</text:p>
      <text:p text:style-name="Textbody">↓</text:p>
      <text:p text:style-name="Textbody">không thể vượt.</text:p>
      <text:p text:style-name="Textbody">Do đó hãy định vị</text:p>
      <text:p text:style-name="Textbody">AI của nhóm làm</text:p>
      <text:list text:style-name="LFO9" text:continue-numbering="true">
        <text:list-item>
          <text:p text:style-name="P25">chuẩn hóa dữ liệu</text:p>
        </text:list-item>
        <text:list-item>
          <text:p text:style-name="P26">đánh giá rủi ro</text:p>
        </text:list-item>
        <text:list-item>
          <text:p text:style-name="P27">sinh bản tin</text:p>
        </text:list-item>
        <text:list-item>
          <text:p text:style-name="P28">cá nhân hóa</text:p>
        </text:list-item>
        <text:list-item>
          <text:p text:style-name="P29">cảnh báo</text:p>
        </text:list-item>
      </text:list>
      <text:p text:style-name="Textbody">Đó mới là giá trị.</text:p>
      <text:h text:style-name="Heading2" text:outline-level="2">Câu 7</text:h>
      <text:p text:style-name="Quotations">Kênh nào?</text:p>
      <text:soft-page-break/>
      <text:p text:style-name="Textbody">Theo mình</text:p>
      <text:p text:style-name="Textbody">Dashboard</text:p>
      <text:p text:style-name="Textbody">↓</text:p>
      <text:p text:style-name="Textbody">Zalo</text:p>
      <text:p text:style-name="Textbody">↓</text:p>
      <text:p text:style-name="Textbody">SMS</text:p>
      <text:p text:style-name="Textbody">Loa công cộng</text:p>
      <text:p text:style-name="Textbody">chỉ mô phỏng payload.</text:p>
      <text:p text:style-name="Textbody">Không cần tích hợp thật.</text:p>
      <text:h text:style-name="Heading2" text:outline-level="2">Câu 8</text:h>
      <text:p text:style-name="Quotations">DEM và ảnh vệ tinh?</text:p>
      <text:p text:style-name="Textbody">Roadmap.</text:p>
      <text:p text:style-name="Textbody">Không nên đưa vào MVP.</text:p>
      <text:h text:style-name="Heading2" text:outline-level="2">Câu 9</text:h>
      <text:p text:style-name="Quotations">Metric nào đủ?</text:p>
      <text:p text:style-name="Textbody">Forecast</text:p>
      <text:list text:style-name="LFO10" text:continue-numbering="true">
        <text:list-item>
          <text:p text:style-name="P30">MAE</text:p>
        </text:list-item>
        <text:list-item>
          <text:p text:style-name="P31">RMSE</text:p>
        </text:list-item>
      </text:list>
      <text:p text:style-name="Textbody">Warning</text:p>
      <text:list text:style-name="LFO11" text:continue-numbering="true">
        <text:list-item>
          <text:p text:style-name="P32">Precision</text:p>
        </text:list-item>
        <text:list-item>
          <text:p text:style-name="P33">Recall</text:p>
        </text:list-item>
        <text:list-item>
          <text:p text:style-name="P34">F1</text:p>
        </text:list-item>
      </text:list>
      <text:p text:style-name="Textbody">System</text:p>
      <text:list text:style-name="LFO12" text:continue-numbering="true">
        <text:list-item>
          <text:p text:style-name="P35">latency</text:p>
        </text:list-item>
      </text:list>
      <text:p text:style-name="Textbody">User</text:p>
      <text:list text:style-name="LFO13" text:continue-numbering="true">
        <text:list-item>
          <text:p text:style-name="P36">hiểu cảnh báo</text:p>
        </text:list-item>
      </text:list>
      <text:p text:style-name="Textbody">là đủ.</text:p>
      <text:soft-page-break/>
      <text:h text:style-name="Heading1" text:outline-level="1">2. Theo mình tài liệu đang thiếu</text:h>
      <text:h text:style-name="Heading2" text:outline-level="2">Thiếu kiến trúc dữ liệu</text:h>
      <text:p text:style-name="Textbody">Ví dụ</text:p>
      <text:p text:style-name="PreformattedText"><text:span text:style-name="SourceText">API</text:span></text:p>
      <text:p text:style-name="PreformattedText"/>
      <text:p text:style-name="PreformattedText"><text:span text:style-name="SourceText">↓</text:span></text:p>
      <text:p text:style-name="PreformattedText"/>
      <text:p text:style-name="PreformattedText"><text:span text:style-name="SourceText">Normalize</text:span></text:p>
      <text:p text:style-name="PreformattedText"/>
      <text:p text:style-name="PreformattedText"><text:span text:style-name="SourceText">↓</text:span></text:p>
      <text:p text:style-name="PreformattedText"/>
      <text:p text:style-name="PreformattedText"><text:span text:style-name="SourceText">Forecast Object</text:span></text:p>
      <text:p text:style-name="PreformattedText"/>
      <text:p text:style-name="PreformattedText"><text:span text:style-name="SourceText">↓</text:span></text:p>
      <text:p text:style-name="PreformattedText"/>
      <text:p text:style-name="PreformattedText"><text:span text:style-name="SourceText">Risk Engine</text:span></text:p>
      <text:p text:style-name="PreformattedText"/>
      <text:p text:style-name="PreformattedText"><text:span text:style-name="SourceText">↓</text:span></text:p>
      <text:p text:style-name="PreformattedText"/>
      <text:p text:style-name="PreformattedText"><text:span text:style-name="SourceText">Warning Object</text:span></text:p>
      <text:p text:style-name="PreformattedText"/>
      <text:p text:style-name="PreformattedText"><text:span text:style-name="SourceText">↓</text:span></text:p>
      <text:p text:style-name="PreformattedText"/>
      <text:p text:style-name="PreformattedText"><text:span text:style-name="SourceText">LLM</text:span></text:p>
      <text:p text:style-name="PreformattedText"/>
      <text:p text:style-name="PreformattedText"><text:span text:style-name="SourceText">↓</text:span></text:p>
      <text:p text:style-name="PreformattedText"/>
      <text:p text:style-name="P37"><text:span text:style-name="SourceText">Dashboard</text:span></text:p>
      <text:p text:style-name="Textbody">Đây là luồng rất quan trọng.</text:p>
      <text:h text:style-name="Heading2" text:outline-level="2">Thiếu schema</text:h>
      <text:p text:style-name="Textbody">Ví dụ</text:p>
      <text:p text:style-name="PreformattedText"><text:span text:style-name="SourceText">Forecast</text:span></text:p>
      <text:p text:style-name="PreformattedText"/>
      <text:p text:style-name="PreformattedText"><text:span text:style-name="SourceText">{</text:span></text:p>
      <text:p text:style-name="PreformattedText"><text:span text:style-name="SourceText"><text:s/>location</text:span></text:p>
      <text:p text:style-name="PreformattedText"><text:span text:style-name="SourceText"><text:s/>rain</text:span></text:p>
      <text:p text:style-name="PreformattedText"><text:span text:style-name="SourceText"><text:s/>temp</text:span></text:p>
      <text:p text:style-name="PreformattedText"><text:span text:style-name="SourceText"><text:s/>humidity</text:span></text:p>
      <text:p text:style-name="PreformattedText"><text:span text:style-name="SourceText"><text:s/>wind</text:span></text:p>
      <text:p text:style-name="PreformattedText"><text:span text:style-name="SourceText"><text:s/>timestamp</text:span></text:p>
      <text:p text:style-name="P38"><text:span text:style-name="SourceText">}</text:span></text:p>
      <text:p text:style-name="Textbody">và</text:p>
      <text:p text:style-name="PreformattedText"><text:span text:style-name="SourceText">Warning</text:span></text:p>
      <text:p text:style-name="PreformattedText"/>
      <text:p text:style-name="PreformattedText"><text:span text:style-name="SourceText">{</text:span></text:p>
      <text:p text:style-name="PreformattedText"><text:span text:style-name="SourceText"><text:s/>level</text:span></text:p>
      <text:p text:style-name="PreformattedText"><text:span text:style-name="SourceText"><text:s/>hazard</text:span></text:p>
      <text:p text:style-name="PreformattedText"><text:span text:style-name="SourceText"><text:s/>action</text:span></text:p>
      <text:p text:style-name="PreformattedText"><text:span text:style-name="SourceText"><text:s/>confidence</text:span></text:p>
      <text:soft-page-break/>
      <text:p text:style-name="P39"><text:span text:style-name="SourceText">}</text:span></text:p>
      <text:p text:style-name="Textbody">Sau này backend rất dễ.</text:p>
      <text:h text:style-name="Heading2" text:outline-level="2">Thiếu rule engine</text:h>
      <text:p text:style-name="Textbody">Ví dụ</text:p>
      <text:p text:style-name="PreformattedText"><text:span text:style-name="SourceText">if rain &gt;50</text:span></text:p>
      <text:p text:style-name="PreformattedText"/>
      <text:p text:style-name="PreformattedText"><text:span text:style-name="SourceText">↓</text:span></text:p>
      <text:p text:style-name="PreformattedText"/>
      <text:p text:style-name="P40"><text:span text:style-name="SourceText">Warning Orange</text:span></text:p>
      <text:p text:style-name="Textbody">nên tách hoàn toàn khỏi AI.</text:p>
      <text:h text:style-name="Heading2" text:outline-level="2">Thiếu fallback</text:h>
      <text:p text:style-name="Textbody">Ví dụ</text:p>
      <text:p text:style-name="Textbody">OpenWeather chết</text:p>
      <text:p text:style-name="Textbody">↓</text:p>
      <text:p text:style-name="Textbody">OpenMeteo</text:p>
      <text:p text:style-name="Textbody">↓</text:p>
      <text:p text:style-name="Textbody">cache</text:p>
      <text:p text:style-name="Textbody">↓</text:p>
      <text:p text:style-name="Textbody">last forecast</text:p>
      <text:p text:style-name="Textbody">Đây là điểm mentor rất thích.</text:p>
      <text:h text:style-name="Heading2" text:outline-level="2">Thiếu confidence</text:h>
      <text:p text:style-name="Textbody">Ví dụ</text:p>
      <text:p text:style-name="PreformattedText"><text:span text:style-name="SourceText">Rain</text:span></text:p>
      <text:p text:style-name="PreformattedText"/>
      <text:p text:style-name="PreformattedText"><text:span text:style-name="SourceText">75%</text:span></text:p>
      <text:p text:style-name="PreformattedText"/>
      <text:p text:style-name="PreformattedText"><text:span text:style-name="SourceText">Confidence</text:span></text:p>
      <text:p text:style-name="PreformattedText"/>
      <text:p text:style-name="P41"><text:span text:style-name="SourceText">0.81</text:span></text:p>
      <text:p text:style-name="Textbody">User biết độ tin cậy.</text:p>
      <text:h text:style-name="Heading1" text:outline-level="1">3. Theo mình nên bỏ</text:h>
      <text:p text:style-name="Textbody">Đây là phần mình nghĩ sẽ tốn thời gian nhưng giá trị demo thấp.</text:p>
      <text:h text:style-name="Heading2" text:outline-level="2">Không làm</text:h>
      <text:p text:style-name="Textbody">Downscaling AI</text:p>
      <text:soft-page-break/>
      <text:p text:style-name="Textbody">Satellite segmentation</text:p>
      <text:p text:style-name="Textbody">Vision AI</text:p>
      <text:p text:style-name="Textbody">Fine tuning LLM</text:p>
      <text:p text:style-name="Textbody">Train weather model</text:p>
      <text:p text:style-name="Textbody">RAG</text:p>
      <text:p text:style-name="Textbody">Agent</text:p>
      <text:p text:style-name="Textbody">Vector Database</text:p>
      <text:p text:style-name="Textbody">Multi-Agent AI</text:p>
      <text:p text:style-name="Textbody">Những cái này không tăng nhiều điểm MVP.</text:p>
      <text:h text:style-name="Heading1" text:outline-level="1">4. Thứ nên đầu tư nhiều nhất</text:h>
      <text:p text:style-name="Textbody">Nếu mình là PM mình sẽ phân bổ</text:p>
      <text:p text:style-name="Textbody">30%</text:p>
      <text:p text:style-name="Textbody">Backend</text:p>
      <text:p text:style-name="Textbody">15%</text:p>
      <text:p text:style-name="Textbody">Forecast</text:p>
      <text:p text:style-name="Textbody">25%</text:p>
      <text:p text:style-name="Textbody">Warning Engine</text:p>
      <text:p text:style-name="Textbody">20%</text:p>
      <text:p text:style-name="Textbody">Dashboard</text:p>
      <text:p text:style-name="Textbody">10%</text:p>
      <text:p text:style-name="Textbody">LLM</text:p>
      <text:p text:style-name="Textbody">Vì người dùng nhìn thấy</text:p>
      <text:p text:style-name="Textbody">Forecast</text:p>
      <text:p text:style-name="Textbody">↓</text:p>
      <text:p text:style-name="Textbody">Warning</text:p>
      <text:p text:style-name="Textbody">↓</text:p>
      <text:p text:style-name="Textbody">Action</text:p>
      <text:p text:style-name="Textbody">chứ không quan tâm bạn dùng GPT hay LSTM.</text:p>
      <text:h text:style-name="Heading1" text:outline-level="1">5. MVP tối ưu nhất (khuyến nghị)</text:h>
      <text:p text:style-name="Textbody">Theo mình MVP nên chỉ còn<text:s/><text:span text:style-name="StrongEmphasis">6 module</text:span>:</text:p>
      <text:soft-page-break/>
      <text:p text:style-name="PreformattedText"><text:span text:style-name="SourceText">Open-Meteo API</text:span></text:p>
      <text:p text:style-name="PreformattedText"><text:span text:style-name="SourceText"><text:s text:c="8"/>│</text:span></text:p>
      <text:p text:style-name="PreformattedText"><text:span text:style-name="SourceText"><text:s text:c="8"/>▼</text:span></text:p>
      <text:p text:style-name="PreformattedText"><text:span text:style-name="SourceText">Data Normalizer</text:span></text:p>
      <text:p text:style-name="PreformattedText"><text:span text:style-name="SourceText"><text:s text:c="8"/>│</text:span></text:p>
      <text:p text:style-name="PreformattedText"><text:span text:style-name="SourceText"><text:s text:c="8"/>▼</text:span></text:p>
      <text:p text:style-name="PreformattedText"><text:span text:style-name="SourceText">Forecast Engine</text:span></text:p>
      <text:p text:style-name="PreformattedText"><text:span text:style-name="SourceText"><text:s text:c="8"/>│</text:span></text:p>
      <text:p text:style-name="PreformattedText"><text:span text:style-name="SourceText"><text:s text:c="8"/>▼</text:span></text:p>
      <text:p text:style-name="PreformattedText"><text:span text:style-name="SourceText">Warning Rule Engine</text:span></text:p>
      <text:p text:style-name="PreformattedText"><text:span text:style-name="SourceText"><text:s text:c="8"/>│</text:span></text:p>
      <text:p text:style-name="PreformattedText"><text:span text:style-name="SourceText"><text:s text:c="8"/>▼</text:span></text:p>
      <text:p text:style-name="PreformattedText"><text:span text:style-name="SourceText">LLM tạo bản tin + dịch</text:span></text:p>
      <text:p text:style-name="PreformattedText"><text:span text:style-name="SourceText"><text:s text:c="8"/>│</text:span></text:p>
      <text:p text:style-name="PreformattedText"><text:span text:style-name="SourceText"><text:s text:c="8"/>▼</text:span></text:p>
      <text:p text:style-name="P42"><text:span text:style-name="SourceText">Dashboard + Zalo Mock</text:span></text:p>
      <text:p text:style-name="Textbody">Đây là pipeline hoàn chỉnh, dễ demo và đủ thể hiện năng lực hệ thống.</text:p>
      <text:h text:style-name="Heading1" text:outline-level="1">6. Kế hoạch hoàn thành nhanh nhất (ưu tiên)</text:h>
      <text:p text:style-name="Textbody">Mình sẽ làm theo đúng thứ tự này:</text:p>
      <text:list text:style-name="LFO14" text:continue-numbering="true">
        <text:list-item>
          <text:p text:style-name="P43"><text:span text:style-name="StrongEmphasis">Khóa phạm vi dự án</text:span>: chỉ hỗ trợ 3 vị trí, 3 loại nguy cơ, 7 ngày dự báo.</text:p>
        </text:list-item>
        <text:list-item>
          <text:p text:style-name="P44"><text:span text:style-name="StrongEmphasis">Chuẩn hóa schema dữ liệu</text:span>: định nghĩa<text:s/><text:span text:style-name="SourceText">Forecast</text:span>,<text:s/><text:span text:style-name="SourceText">Warning</text:span>,<text:s/><text:span text:style-name="SourceText">Location</text:span>,<text:s/><text:span text:style-name="SourceText">Risk</text:span><text:s/>để tất cả module dùng chung.</text:p>
        </text:list-item>
        <text:list-item>
          <text:p text:style-name="P45"><text:span text:style-name="StrongEmphasis">Tích hợp nguồn dự báo</text:span>: dùng Open-Meteo làm nguồn chính, thêm cơ chế fallback và cache khi API lỗi.</text:p>
        </text:list-item>
        <text:list-item>
          <text:p text:style-name="P46"><text:span text:style-name="StrongEmphasis">Xây dựng Rule Engine</text:span>: hiện thực toàn bộ ngưỡng cảnh báo bằng file cấu hình (JSON/YAML), không hard-code.</text:p>
        </text:list-item>
        <text:list-item>
          <text:p text:style-name="P47"><text:span text:style-name="StrongEmphasis">Hoàn thiện Dashboard</text:span>: hiển thị màu, biểu tượng, hành động khuyến nghị, biểu đồ dự báo.</text:p>
        </text:list-item>
        <text:list-item>
          <text:p text:style-name="P48"><text:span text:style-name="StrongEmphasis">Thêm LLM</text:span>: chỉ dùng để viết bản tin ngắn và dịch thử nghiệm, không tham gia quyết định mức cảnh báo.</text:p>
        </text:list-item>
        <text:list-item>
          <text:p text:style-name="P49"><text:span text:style-name="StrongEmphasis">Mô phỏng Zalo/SMS/Loa</text:span>: sinh payload hoặc tin nhắn mẫu, chưa cần tích hợp thật.</text:p>
        </text:list-item>
        <text:list-item>
          <text:p text:style-name="P50"><text:span text:style-name="StrongEmphasis">Viết tài liệu và quay video demo</text:span>: kiến trúc, luồng dữ liệu, giới hạn hệ thống và roadmap.</text:p>
        </text:list-item>
      </text:list>
      <text:h text:style-name="Heading2" text:outline-level="2">Kết luận</text:h>
      <text:p text:style-name="Textbody">Sau khi đọc tài liệu, mình đánh giá dự án đã có nền tảng khá tốt nhưng đang mắc một vấn đề phổ biến:<text:s/><text:span text:style-name="StrongEmphasis">ôm quá nhiều hướng AI cùng lúc</text:span>. Các nội dung như downscaling, ảnh vệ tinh, huấn luyện mô hình thời tiết, LLM nâng cao... đều có giá trị nghiên cứu nhưng sẽ làm kéo dài tiến độ.</text:p>
      <text:p text:style-name="Textbody">Nếu mục tiêu là<text:s/><text:span text:style-name="StrongEmphasis">hoàn thành dự án nhanh với chất lượng cao</text:span>, mình khuyến nghị giữ đúng trọng tâm:</text:p>
      <text:list text:style-name="LFO15" text:continue-numbering="true">
        <text:list-item>
          <text:p text:style-name="P51"><text:span text:style-name="StrongEmphasis">Dùng API dự báo thời tiết đáng tin cậy thay vì tự huấn luyện mô hình dự báo.</text:span></text:p>
        </text:list-item>
        <text:list-item>
          <text:p text:style-name="P52"><text:span text:style-name="StrongEmphasis">Tập trung vào hệ thống cảnh báo địa phương hóa</text:span><text:s/>(Risk Engine + hành động + giao diện dễ hiểu).</text:p>
        </text:list-item>
        <text:list-item>
          <text:p text:style-name="P53"><text:span text:style-name="StrongEmphasis">Đầu tư vào kiến trúc, luồng dữ liệu, Rule Engine và trải nghiệm người dùng</text:span>, vì đây là những phần tạo nên giá trị khác biệt của sản phẩm và cũng là nội dung dễ chứng minh trong buổi demo.</text:p>
        </text:list-item>
      </text:list>
      <text:h text:style-name="Heading2" text:outline-level="2">Tổng quan kiến trúc</text:h>
      <text:p text:style-name="Textbody">Project hiện có khoảng<text:s/><text:span text:style-name="StrongEmphasis">259 file</text:span><text:s/>và được chia thành các module chính:</text:p>
      <text:p text:style-name="PreformattedText"><text:span text:style-name="SourceText">Forestgump-main/</text:span></text:p>
      <text:p text:style-name="PreformattedText"><text:span text:style-name="SourceText">│</text:span></text:p>
      <text:p text:style-name="PreformattedText"><text:span text:style-name="SourceText">├── backend/ <text:s text:c="10"/>← Node.js/TypeScript API</text:span></text:p>
      <text:p text:style-name="PreformattedText"><text:span text:style-name="SourceText">├── ai_engine/ <text:s text:c="8"/>← Python AI Engine</text:span></text:p>
      <text:p text:style-name="PreformattedText"><text:span text:style-name="SourceText">├── dashboard/ <text:s text:c="8"/>← Frontend</text:span></text:p>
      <text:p text:style-name="PreformattedText"><text:span text:style-name="SourceText">├── infra/ <text:s text:c="12"/>← MQTT</text:span></text:p>
      <text:p text:style-name="PreformattedText"><text:span text:style-name="SourceText">├── docs/</text:span></text:p>
      <text:p text:style-name="PreformattedText"><text:span text:style-name="SourceText">├── docker-compose.yml</text:span></text:p>
      <text:p text:style-name="P54"><text:span text:style-name="SourceText">└── ...</text:span></text:p>
      <text:p text:style-name="Textbody">Điều này khá phù hợp với hướng microservice mà tài liệu mô tả.</text:p>
      <text:h text:style-name="Heading1" text:outline-level="1">Sau khi xem sơ bộ mình thấy có một số điểm cần lưu ý ngay</text:h>
      <text:h text:style-name="Heading2" text:outline-level="2">1. AI đang bị "ôm" quá nhiều</text:h>
      <text:p text:style-name="Textbody">Trong<text:s/><text:span text:style-name="SourceText">ai_engine</text:span><text:s/>mình thấy:</text:p>
      <text:p text:style-name="PreformattedText"><text:span text:style-name="SourceText">downscale.py</text:span></text:p>
      <text:p text:style-name="PreformattedText"><text:span text:style-name="SourceText">train.py</text:span></text:p>
      <text:p text:style-name="PreformattedText"><text:span text:style-name="SourceText">train_flood.py</text:span></text:p>
      <text:p text:style-name="PreformattedText"><text:span text:style-name="SourceText">features.py</text:span></text:p>
      <text:p text:style-name="PreformattedText"><text:span text:style-name="SourceText">risk_engine.py</text:span></text:p>
      <text:p text:style-name="PreformattedText"><text:span text:style-name="SourceText">bulletin.py</text:span></text:p>
      <text:p text:style-name="P55"><text:span text:style-name="SourceText">thresholds.py</text:span></text:p>
      <text:p text:style-name="Textbody">Điều này cho thấy project đang cố làm cùng lúc:</text:p>
      <text:list text:style-name="LFO16" text:continue-numbering="true">
        <text:list-item>
          <text:p text:style-name="P56">Downscaling</text:p>
        </text:list-item>
        <text:list-item>
          <text:p text:style-name="P57">Forecast AI</text:p>
        </text:list-item>
        <text:list-item>
          <text:p text:style-name="P58">Flood model</text:p>
        </text:list-item>
        <text:list-item>
          <text:p text:style-name="P59">Risk Engine</text:p>
        </text:list-item>
        <text:list-item>
          <text:p text:style-name="P60">Bulletin Generation</text:p>
        </text:list-item>
      </text:list>
      <text:p text:style-name="Textbody">Trong khi MVP của đề bài thực ra chỉ cần:</text:p>
      <text:p text:style-name="PreformattedText"><text:span text:style-name="SourceText">Forecast API</text:span></text:p>
      <text:p text:style-name="PreformattedText"><text:span text:style-name="SourceText"><text:s text:c="6"/>↓</text:span></text:p>
      <text:p text:style-name="PreformattedText"><text:span text:style-name="SourceText">Risk Engine</text:span></text:p>
      <text:p text:style-name="PreformattedText"><text:span text:style-name="SourceText"><text:s text:c="6"/>↓</text:span></text:p>
      <text:p text:style-name="P61"><text:span text:style-name="SourceText">Bulletin</text:span></text:p>
      <text:soft-page-break/>
      <text:p text:style-name="Textbody">2. Backend khá đầy đủ</text:p>
      <text:p text:style-name="Textbody">Backend đã có:</text:p>
      <text:list text:style-name="LFO17" text:continue-numbering="true">
        <text:list-item>
          <text:p text:style-name="P62">alert</text:p>
        </text:list-item>
        <text:list-item>
          <text:p text:style-name="P63">api</text:p>
        </text:list-item>
        <text:list-item>
          <text:p text:style-name="P64">db</text:p>
        </text:list-item>
        <text:list-item>
          <text:p text:style-name="P65">mail</text:p>
        </text:list-item>
        <text:list-item>
          <text:p text:style-name="P66">chat</text:p>
        </text:list-item>
        <text:list-item>
          <text:p text:style-name="P67">ai-risk-client</text:p>
        </text:list-item>
        <text:list-item>
          <text:p text:style-name="P68">locations</text:p>
        </text:list-item>
      </text:list>
      <text:p text:style-name="Textbody">Điều này khá tốt.</text:p>
      <text:p text:style-name="Textbody">Nhưng mình cần xem xem:</text:p>
      <text:list text:style-name="LFO18" text:continue-numbering="true">
        <text:list-item>
          <text:p text:style-name="P69">API nào đang dư</text:p>
        </text:list-item>
        <text:list-item>
          <text:p text:style-name="P70">Có bị business logic nằm lẫn trong controller không</text:p>
        </text:list-item>
        <text:list-item>
          <text:p text:style-name="P71">Risk Engine đang nằm ở backend hay AI Engine</text:p>
        </text:list-item>
      </text:list>
      <text:h text:style-name="Heading1" text:outline-level="1">Mình nghĩ có thể tối ưu rất mạnh</text:h>
      <text:p text:style-name="Textbody">Ví dụ nếu đúng như mình đoán thì pipeline có thể rút xuống:</text:p>
      <text:p text:style-name="PreformattedText"><text:span text:style-name="SourceText">Open-Meteo</text:span></text:p>
      <text:p text:style-name="PreformattedText"/>
      <text:p text:style-name="PreformattedText"><text:span text:style-name="SourceText">↓</text:span></text:p>
      <text:p text:style-name="PreformattedText"/>
      <text:p text:style-name="PreformattedText"><text:span text:style-name="SourceText">Normalize</text:span></text:p>
      <text:p text:style-name="PreformattedText"/>
      <text:p text:style-name="PreformattedText"><text:span text:style-name="SourceText">↓</text:span></text:p>
      <text:p text:style-name="PreformattedText"/>
      <text:p text:style-name="PreformattedText"><text:span text:style-name="SourceText">Risk Engine</text:span></text:p>
      <text:p text:style-name="PreformattedText"/>
      <text:p text:style-name="PreformattedText"><text:span text:style-name="SourceText">↓</text:span></text:p>
      <text:p text:style-name="PreformattedText"/>
      <text:p text:style-name="PreformattedText"><text:span text:style-name="SourceText">LLM Bulletin</text:span></text:p>
      <text:p text:style-name="PreformattedText"/>
      <text:p text:style-name="PreformattedText"><text:span text:style-name="SourceText">↓</text:span></text:p>
      <text:p text:style-name="PreformattedText"/>
      <text:p text:style-name="PreformattedText"><text:span text:style-name="SourceText">Dashboard</text:span></text:p>
      <text:p text:style-name="PreformattedText"/>
      <text:p text:style-name="PreformattedText"><text:span text:style-name="SourceText">↓</text:span></text:p>
      <text:p text:style-name="PreformattedText"/>
      <text:p text:style-name="P72"><text:span text:style-name="SourceText">Zalo/SMS</text:span></text:p>
      <text:p text:style-name="Textbody">không cần:</text:p>
      <text:list text:style-name="LFO19" text:continue-numbering="true">
        <text:list-item>
          <text:p text:style-name="P73">train.py</text:p>
        </text:list-item>
        <text:list-item>
          <text:p text:style-name="P74">train_flood.py</text:p>
        </text:list-item>
        <text:list-item>
          <text:p text:style-name="P75">downscale AI</text:p>
        </text:list-item>
      </text:list>
      <text:p text:style-name="Textbody">ở MVP.</text:p>
      <text:h text:style-name="Heading1" text:outline-level="1">Đề xuất</text:h>
      <text:h text:style-name="Heading1" text:outline-level="1">Kiến trúc hiện tại</text:h>
      <text:p text:style-name="Textbody">Hiện tại project là</text:p>
      <text:p text:style-name="PreformattedText"><text:span text:style-name="SourceText">Firmware</text:span></text:p>
      <text:p text:style-name="PreformattedText"><text:span text:style-name="SourceText"><text:s text:c="6"/>│</text:span></text:p>
      <text:p text:style-name="PreformattedText"><text:span text:style-name="SourceText">MQTT</text:span></text:p>
      <text:p text:style-name="PreformattedText"><text:span text:style-name="SourceText"><text:s text:c="6"/>│</text:span></text:p>
      <text:p text:style-name="PreformattedText"><text:span text:style-name="SourceText">Backend</text:span></text:p>
      <text:p text:style-name="PreformattedText"><text:span text:style-name="SourceText"><text:s text:c="6"/>│</text:span></text:p>
      <text:p text:style-name="PreformattedText"><text:span text:style-name="SourceText"><text:s/>├── Dashboard</text:span></text:p>
      <text:p text:style-name="PreformattedText"><text:span text:style-name="SourceText"><text:s/>├── AI Engine</text:span></text:p>
      <text:p text:style-name="P76"><text:span text:style-name="SourceText"><text:s/>└── Satellite Engine</text:span></text:p>
      <text:p text:style-name="Textbody">Kiến trúc này khá đẹp.</text:p>
      <text:p text:style-name="Textbody">Nhưng...</text:p>
      <text:h text:style-name="Heading1" text:outline-level="1">Satellite Engine</text:h>
      <text:p text:style-name="Textbody">Đây là điều đầu tiên mình muốn nói.</text:p>
      <text:p text:style-name="Textbody">Bạn có cả</text:p>
      <text:p text:style-name="P77"><text:span text:style-name="SourceText">satellite_engine/</text:span></text:p>
      <text:p text:style-name="Textbody">Nếu đọc proposal thì trước đây bạn cũng muốn dùng</text:p>
      <text:list text:style-name="LFO20" text:continue-numbering="true">
        <text:list-item>
          <text:p text:style-name="P78">Sentinel</text:p>
        </text:list-item>
        <text:list-item>
          <text:p text:style-name="P79">Landsat</text:p>
        </text:list-item>
        <text:list-item>
          <text:p text:style-name="P80">DEM</text:p>
        </text:list-item>
      </text:list>
      <text:p text:style-name="Textbody">Theo mình</text:p>
      <text:h text:style-name="Heading2" text:outline-level="2">Không nên làm trong MVP.</text:h>
      <text:p text:style-name="Textbody">Lý do</text:p>
      <text:p text:style-name="Textbody">Satellite AI là một project riêng.</text:p>
      <text:p text:style-name="Textbody">Muốn chạy được cần</text:p>
      <text:list text:style-name="LFO21" text:continue-numbering="true">
        <text:list-item>
          <text:p text:style-name="P81">dataset</text:p>
        </text:list-item>
        <text:list-item>
          <text:p text:style-name="P82">segmentation</text:p>
        </text:list-item>
        <text:list-item>
          <text:p text:style-name="P83">training</text:p>
        </text:list-item>
        <text:list-item>
          <text:p text:style-name="P84">inference</text:p>
        </text:list-item>
        <text:list-item>
          <text:p text:style-name="P85">validation</text:p>
        </text:list-item>
      </text:list>
      <text:p text:style-name="Textbody">Một mình module này đủ làm khóa luận.</text:p>
      <text:p text:style-name="Textbody"><text:span text:style-name="StrongEmphasis">=&gt; Đưa vào Roadmap.</text:span></text:p>
      <text:h text:style-name="Heading1" text:outline-level="1">Firmware</text:h>
      <text:p text:style-name="Textbody">Bạn còn có</text:p>
      <text:p text:style-name="P86"><text:span text:style-name="SourceText">firmware/</text:span></text:p>
      <text:p text:style-name="Textbody">ESP32</text:p>
      <text:p text:style-name="Textbody">MQTT</text:p>
      <text:p text:style-name="Textbody">Modem</text:p>
      <text:p text:style-name="Textbody">...</text:p>
      <text:p text:style-name="Textbody">Điều này rất hay.</text:p>
      <text:p text:style-name="Textbody">Nhưng...</text:p>
      <text:p text:style-name="Textbody">MVP đâu yêu cầu IoT.</text:p>
      <text:p text:style-name="Textbody">Nếu không có cảm biến thật</text:p>
      <text:p text:style-name="Textbody">↓</text:p>
      <text:p text:style-name="Textbody">đừng đầu tư thêm.</text:p>
      <text:h text:style-name="Heading1" text:outline-level="1">AI Engine</text:h>
      <text:p text:style-name="Textbody">Đây là nơi mình thấy đáng tối ưu nhất.</text:p>
      <text:p text:style-name="Textbody">Theo cấu trúc</text:p>
      <text:p text:style-name="PreformattedText"><text:span text:style-name="SourceText">bulletin.py</text:span></text:p>
      <text:p text:style-name="PreformattedText"/>
      <text:p text:style-name="PreformattedText"><text:span text:style-name="SourceText">risk_engine.py</text:span></text:p>
      <text:p text:style-name="PreformattedText"/>
      <text:p text:style-name="PreformattedText"><text:span text:style-name="SourceText">thresholds.py</text:span></text:p>
      <text:p text:style-name="PreformattedText"/>
      <text:p text:style-name="PreformattedText"><text:span text:style-name="SourceText">downscale.py</text:span></text:p>
      <text:p text:style-name="PreformattedText"/>
      <text:p text:style-name="PreformattedText"><text:span text:style-name="SourceText">train.py</text:span></text:p>
      <text:p text:style-name="PreformattedText"/>
      <text:p text:style-name="P87"><text:span text:style-name="SourceText">train_flood.py</text:span></text:p>
      <text:p text:style-name="Textbody">Mình sẽ chia thành</text:p>
      <text:soft-page-break/>
      <text:h text:style-name="Heading2" text:outline-level="2">Nên giữ</text:h>
      <text:list text:style-name="LFO22" text:continue-numbering="true">
        <text:list-item>
          <text:p text:style-name="P88">risk_engine</text:p>
        </text:list-item>
        <text:list-item>
          <text:p text:style-name="P89">thresholds</text:p>
        </text:list-item>
        <text:list-item>
          <text:p text:style-name="P90">bulletin</text:p>
        </text:list-item>
      </text:list>
      <text:p text:style-name="Textbody">Đây là trái tim của sản phẩm.</text:p>
      <text:h text:style-name="Heading2" text:outline-level="2">Có thể bỏ khỏi MVP</text:h>
      <text:p text:style-name="Textbody">downscale</text:p>
      <text:p text:style-name="Textbody">train</text:p>
      <text:p text:style-name="Textbody">train_flood</text:p>
      <text:p text:style-name="Textbody">feature engineering</text:p>
      <text:p text:style-name="Textbody">...</text:p>
      <text:p text:style-name="Textbody">Lý do</text:p>
      <text:p text:style-name="Textbody">Bạn không thể thắng ECMWF.</text:p>
      <text:h text:style-name="Heading1" text:outline-level="1">Forecast</text:h>
      <text:p text:style-name="Textbody">Theo mình</text:p>
      <text:p text:style-name="Textbody">Forecast nên là</text:p>
      <text:p text:style-name="PreformattedText"><text:span text:style-name="SourceText">Open-Meteo</text:span></text:p>
      <text:p text:style-name="PreformattedText"/>
      <text:p text:style-name="PreformattedText"><text:span text:style-name="SourceText">↓</text:span></text:p>
      <text:p text:style-name="PreformattedText"/>
      <text:p text:style-name="PreformattedText"><text:span text:style-name="SourceText">Normalize</text:span></text:p>
      <text:p text:style-name="PreformattedText"/>
      <text:p text:style-name="PreformattedText"><text:span text:style-name="SourceText">↓</text:span></text:p>
      <text:p text:style-name="PreformattedText"/>
      <text:p text:style-name="P91"><text:span text:style-name="SourceText">Done</text:span></text:p>
      <text:p text:style-name="Textbody">Không nên</text:p>
      <text:p text:style-name="PreformattedText"><text:span text:style-name="SourceText">Open-Meteo</text:span></text:p>
      <text:p text:style-name="PreformattedText"/>
      <text:p text:style-name="PreformattedText"><text:span text:style-name="SourceText">↓</text:span></text:p>
      <text:p text:style-name="PreformattedText"/>
      <text:p text:style-name="PreformattedText"><text:span text:style-name="SourceText">Train AI</text:span></text:p>
      <text:p text:style-name="PreformattedText"/>
      <text:p text:style-name="PreformattedText"><text:span text:style-name="SourceText">↓</text:span></text:p>
      <text:p text:style-name="PreformattedText"/>
      <text:p text:style-name="P92"><text:span text:style-name="SourceText">Forecast mới</text:span></text:p>
      <text:p text:style-name="Textbody">Vì:</text:p>
      <text:list text:style-name="LFO23" text:continue-numbering="true">
        <text:list-item>
          <text:p text:style-name="P93">mất thời gian</text:p>
        </text:list-item>
        <text:list-item>
          <text:p text:style-name="P94">khó chứng minh tốt hơn</text:p>
        </text:list-item>
        <text:list-item>
          <text:p text:style-name="P95">khó đánh giá</text:p>
        </text:list-item>
      </text:list>
      <text:h text:style-name="Heading1" text:outline-level="1">Backend</text:h>
      <text:p text:style-name="Textbody">Backend đang khá nhiều chức năng.</text:p>
      <text:p text:style-name="Textbody">Theo mình chỉ nên giữ</text:p>
      <text:p text:style-name="PreformattedText"><text:span text:style-name="SourceText">Location</text:span></text:p>
      <text:p text:style-name="PreformattedText"/>
      <text:p text:style-name="PreformattedText"><text:span text:style-name="SourceText">Forecast</text:span></text:p>
      <text:p text:style-name="PreformattedText"/>
      <text:p text:style-name="PreformattedText"><text:span text:style-name="SourceText">Warning</text:span></text:p>
      <text:p text:style-name="PreformattedText"/>
      <text:p text:style-name="PreformattedText"><text:span text:style-name="SourceText">Notification</text:span></text:p>
      <text:p text:style-name="PreformattedText"/>
      <text:p text:style-name="P96"><text:span text:style-name="SourceText">Authentication</text:span></text:p>
      <text:p text:style-name="Textbody">Những gì ngoài 5 cái này xem xét chuyển roadmap.</text:p>
      <text:h text:style-name="Heading1" text:outline-level="1">Dashboard</text:h>
      <text:p text:style-name="Textbody">Dashboard theo mình nên tập trung</text:p>
      <text:p text:style-name="Textbody">Một màn hình</text:p>
      <text:p text:style-name="PreformattedText"><text:span text:style-name="SourceText">Điện Biên</text:span></text:p>
      <text:p text:style-name="PreformattedText"/>
      <text:p text:style-name="PreformattedText"><text:span text:style-name="SourceText">↓</text:span></text:p>
      <text:p text:style-name="PreformattedText"/>
      <text:p text:style-name="PreformattedText"><text:span text:style-name="SourceText">Rain</text:span></text:p>
      <text:p text:style-name="PreformattedText"/>
      <text:p text:style-name="PreformattedText"><text:span text:style-name="SourceText">↓</text:span></text:p>
      <text:p text:style-name="PreformattedText"/>
      <text:p text:style-name="PreformattedText"><text:span text:style-name="SourceText">Warning</text:span></text:p>
      <text:p text:style-name="PreformattedText"/>
      <text:p text:style-name="PreformattedText"><text:span text:style-name="SourceText">↓</text:span></text:p>
      <text:p text:style-name="PreformattedText"/>
      <text:p text:style-name="P97"><text:span text:style-name="SourceText">Action</text:span></text:p>
      <text:p text:style-name="Textbody">không nên làm</text:p>
      <text:list text:style-name="LFO24" text:continue-numbering="true">
        <text:list-item>
          <text:p text:style-name="P98">20 page</text:p>
        </text:list-item>
        <text:list-item>
          <text:p text:style-name="P99">analytics</text:p>
        </text:list-item>
        <text:list-item>
          <text:p text:style-name="P100">admin quá phức tạp</text:p>
        </text:list-item>
      </text:list>
      <text:h text:style-name="Heading1" text:outline-level="1">Điều mình thấy:</text:h>
      <text:p text:style-name="Textbody">Project chia</text:p>
      <text:p text:style-name="PreformattedText"><text:span text:style-name="SourceText">backend</text:span></text:p>
      <text:p text:style-name="PreformattedText"/>
      <text:soft-page-break/>
      <text:p text:style-name="PreformattedText"><text:span text:style-name="SourceText">dashboard</text:span></text:p>
      <text:p text:style-name="PreformattedText"/>
      <text:p text:style-name="PreformattedText"><text:span text:style-name="SourceText">ai_engine</text:span></text:p>
      <text:p text:style-name="PreformattedText"/>
      <text:p text:style-name="PreformattedText"><text:span text:style-name="SourceText">satellite_engine</text:span></text:p>
      <text:p text:style-name="PreformattedText"/>
      <text:p text:style-name="P101"><text:span text:style-name="SourceText">firmware</text:span></text:p>
      <text:p text:style-name="Textbody">Đây là tư duy enterprise.</text:p>
      <text:h text:style-name="Heading1" text:outline-level="1">Nhưng vấn đề</text:h>
      <text:p text:style-name="Textbody">Enterprise</text:p>
      <text:p text:style-name="Textbody">≠</text:p>
      <text:p text:style-name="Textbody">MVP</text:p>
      <text:p text:style-name="Textbody">Bạn đang làm gần như sản phẩm sau 2 năm.</text:p>
      <text:h text:style-name="Heading1" text:outline-level="1">Nếu là mình</text:h>
      <text:p text:style-name="Textbody">Mình sẽ cắt như sau</text:p>
      <text:h text:style-name="Heading2" text:outline-level="2">Giữ</text:h>
      <text:p text:style-name="Textbody">Backend</text:p>
      <text:p text:style-name="Textbody">Dashboard</text:p>
      <text:p text:style-name="Textbody">AI Engine</text:p>
      <text:p text:style-name="Textbody">MQTT</text:p>
      <text:h text:style-name="Heading2" text:outline-level="2">Bỏ khỏi MVP</text:h>
      <text:p text:style-name="Textbody">Satellite</text:p>
      <text:p text:style-name="Textbody">Firmware</text:p>
      <text:p text:style-name="Textbody">Training</text:p>
      <text:p text:style-name="Textbody">Downscaling</text:p>
      <text:p text:style-name="Textbody">Segmentation</text:p>
      <text:h text:style-name="Heading1" text:outline-level="1">Kiến trúc mình đề xuất</text:h>
      <text:p text:style-name="PreformattedText"><text:span text:style-name="SourceText">Open-Meteo API</text:span></text:p>
      <text:p text:style-name="PreformattedText"><text:span text:style-name="SourceText"><text:s text:c="8"/>│</text:span></text:p>
      <text:p text:style-name="PreformattedText"><text:span text:style-name="SourceText"><text:s text:c="8"/>▼</text:span></text:p>
      <text:p text:style-name="PreformattedText"><text:span text:style-name="SourceText">Backend</text:span></text:p>
      <text:p text:style-name="PreformattedText"><text:span text:style-name="SourceText"><text:s text:c="8"/>│</text:span></text:p>
      <text:p text:style-name="PreformattedText"><text:span text:style-name="SourceText"><text:s text:c="8"/>▼</text:span></text:p>
      <text:p text:style-name="PreformattedText"><text:span text:style-name="SourceText">Data Normalize</text:span></text:p>
      <text:p text:style-name="PreformattedText"><text:span text:style-name="SourceText"><text:s text:c="8"/>│</text:span></text:p>
      <text:p text:style-name="PreformattedText"><text:span text:style-name="SourceText"><text:s text:c="8"/>▼</text:span></text:p>
      <text:soft-page-break/>
      <text:p text:style-name="PreformattedText"><text:span text:style-name="SourceText">Risk Engine</text:span></text:p>
      <text:p text:style-name="PreformattedText"><text:span text:style-name="SourceText"><text:s text:c="8"/>│</text:span></text:p>
      <text:p text:style-name="PreformattedText"><text:span text:style-name="SourceText"><text:s text:c="8"/>▼</text:span></text:p>
      <text:p text:style-name="PreformattedText"><text:span text:style-name="SourceText">LLM Bulletin</text:span></text:p>
      <text:p text:style-name="PreformattedText"><text:span text:style-name="SourceText"><text:s text:c="8"/>│</text:span></text:p>
      <text:p text:style-name="PreformattedText"><text:span text:style-name="SourceText"><text:s text:c="8"/>▼</text:span></text:p>
      <text:p text:style-name="PreformattedText"><text:span text:style-name="SourceText">Dashboard</text:span></text:p>
      <text:p text:style-name="PreformattedText"><text:span text:style-name="SourceText"><text:s text:c="8"/>│</text:span></text:p>
      <text:p text:style-name="PreformattedText"><text:span text:style-name="SourceText"><text:s text:c="8"/>▼</text:span></text:p>
      <text:p text:style-name="PreformattedText"><text:span text:style-name="SourceText">Mock SMS</text:span></text:p>
      <text:p text:style-name="P102"><text:span text:style-name="SourceText">Mock Zalo</text:span></text:p>
      <text:p text:style-name="Textbody">Toàn bộ pipeline này hoàn toàn đủ để demo.</text:p>
      <text:h text:style-name="Heading1" text:outline-level="1">Những thiếu sót mình thấy</text:h>
      <text:h text:style-name="Heading2" text:outline-level="2">1. Chưa có Risk Object thống nhất</text:h>
      <text:p text:style-name="Textbody">Ví dụ</text:p>
      <text:p text:style-name="PreformattedText"><text:span text:style-name="SourceText">{</text:span></text:p>
      <text:p text:style-name="PreformattedText"><text:span text:style-name="SourceText"><text:s text:c="2"/>"hazard":"heavy_rain",</text:span></text:p>
      <text:p text:style-name="PreformattedText"><text:span text:style-name="SourceText"><text:s text:c="2"/>"level":"orange",</text:span></text:p>
      <text:p text:style-name="PreformattedText"><text:span text:style-name="SourceText"><text:s text:c="2"/>"confidence":0.91,</text:span></text:p>
      <text:p text:style-name="PreformattedText"><text:span text:style-name="SourceText"><text:s text:c="2"/>"actions":[]</text:span></text:p>
      <text:p text:style-name="P103"><text:span text:style-name="SourceText">}</text:span></text:p>
      <text:p text:style-name="Textbody">Nên có object chung.</text:p>
      <text:h text:style-name="Heading2" text:outline-level="2">2. Chưa có Event Bus</text:h>
      <text:p text:style-name="Textbody">Hiện tại mình đoán</text:p>
      <text:p text:style-name="Textbody">Backend</text:p>
      <text:p text:style-name="Textbody">↓</text:p>
      <text:p text:style-name="Textbody">AI</text:p>
      <text:p text:style-name="Textbody">↓</text:p>
      <text:p text:style-name="Textbody">Dashboard</text:p>
      <text:p text:style-name="Textbody">gọi trực tiếp.</text:p>
      <text:p text:style-name="Textbody">Nếu có thời gian thêm:</text:p>
      <text:p text:style-name="PreformattedText"><text:span text:style-name="SourceText">ForecastUpdated</text:span></text:p>
      <text:p text:style-name="PreformattedText"/>
      <text:p text:style-name="PreformattedText"><text:span text:style-name="SourceText">WarningGenerated</text:span></text:p>
      <text:p text:style-name="PreformattedText"/>
      <text:p text:style-name="P104"><text:span text:style-name="SourceText">BulletinCreated</text:span></text:p>
      <text:p text:style-name="Textbody">sẽ đẹp hơn.</text:p>
      <text:h text:style-name="Heading2" text:outline-level="2">3. Rule Engine</text:h>
      <text:p text:style-name="Textbody">Đừng hardcode</text:p>
      <text:soft-page-break/>
      <text:p text:style-name="P105"><text:span text:style-name="SourceText">if rain &gt;50</text:span></text:p>
      <text:p text:style-name="Textbody">Hãy để</text:p>
      <text:p text:style-name="P106"><text:span text:style-name="SourceText">thresholds.yaml</text:span></text:p>
      <text:p text:style-name="Textbody">Mentor sẽ rất thích.</text:p>
      <text:h text:style-name="Heading2" text:outline-level="2">4. AI nên đứng sau Rule</text:h>
      <text:p text:style-name="Textbody">Không phải</text:p>
      <text:p text:style-name="PreformattedText"><text:span text:style-name="SourceText">AI</text:span></text:p>
      <text:p text:style-name="PreformattedText"/>
      <text:p text:style-name="PreformattedText"><text:span text:style-name="SourceText">↓</text:span></text:p>
      <text:p text:style-name="PreformattedText"/>
      <text:p text:style-name="P107"><text:span text:style-name="SourceText">Rule</text:span></text:p>
      <text:p text:style-name="Textbody">Mà là</text:p>
      <text:p text:style-name="PreformattedText"><text:span text:style-name="SourceText">Forecast</text:span></text:p>
      <text:p text:style-name="PreformattedText"/>
      <text:p text:style-name="PreformattedText"><text:span text:style-name="SourceText">↓</text:span></text:p>
      <text:p text:style-name="PreformattedText"/>
      <text:p text:style-name="PreformattedText"><text:span text:style-name="SourceText">Rule</text:span></text:p>
      <text:p text:style-name="PreformattedText"/>
      <text:p text:style-name="PreformattedText"><text:span text:style-name="SourceText">↓</text:span></text:p>
      <text:p text:style-name="PreformattedText"/>
      <text:p text:style-name="P108"><text:span text:style-name="SourceText">AI viết bản tin</text:span></text:p>
      <text:p text:style-name="Textbody">Đây là điểm rất nhiều nhóm làm sai.</text:p>
      <text:h text:style-name="Heading1" text:outline-level="1">kết luận</text:h>
      <text:p text:style-name="Textbody">Sau khi xem cấu trúc project của bạn và tài liệu yêu cầu, câu trả lời của mình là:</text:p>
      <text:p text:style-name="Quotations"><text:span text:style-name="StrongEmphasis">Nếu vẫn giữ nguyên phạm vi hiện tại: KHÔNG kịp trong 48 tiếng.</text:span></text:p>
      <text:p text:style-name="Quotations"><text:span text:style-name="StrongEmphasis">Nếu cắt đúng phạm vi: HOÀN TOÀN KỊP.</text:span></text:p>
      <text:p text:style-name="Textbody">Điều quan trọng là<text:s/><text:span text:style-name="StrongEmphasis">không phải bỏ AI</text:span>, mà là<text:s/><text:span text:style-name="StrongEmphasis">bỏ AI không tạo ra giá trị cho MVP</text:span>.</text:p>
      <text:h text:style-name="Heading1" text:outline-level="1">Nếu mình là mentor thì mình sẽ chấm cái gì?</text:h>
      <text:p text:style-name="Textbody">Mình sẽ không hỏi:</text:p>
      <text:p text:style-name="Quotations">"Model XGBoost của em cải thiện RMSE bao nhiêu?"</text:p>
      <text:p text:style-name="Textbody">Mình sẽ hỏi:</text:p>
      <text:list text:style-name="LFO25" text:continue-numbering="true">
        <text:list-item>
          <text:p text:style-name="P109">Luồng dữ liệu đi như thế nào?</text:p>
        </text:list-item>
        <text:list-item>
          <text:p text:style-name="P110">Cảnh báo sinh ra ra sao?</text:p>
        </text:list-item>
        <text:list-item>
          <text:p text:style-name="P111">Người dân nhận được gì?</text:p>
        </text:list-item>
        <text:list-item>
          <text:p text:style-name="P112">Hệ thống có hoạt động end-to-end không?</text:p>
        </text:list-item>
      </text:list>
      <text:p text:style-name="Textbody">Đó mới là trọng tâm.</text:p>
      <text:h text:style-name="Heading1" text:outline-level="1">Trong project của bạn đang có 3 loại AI</text:h>
      <text:h text:style-name="Heading2" text:outline-level="2">1. AI Forecast</text:h>
      <text:p text:style-name="Textbody">Ví dụ</text:p>
      <text:p text:style-name="PreformattedText"><text:span text:style-name="SourceText">Open-Meteo</text:span></text:p>
      <text:p text:style-name="PreformattedText"/>
      <text:p text:style-name="PreformattedText"><text:span text:style-name="SourceText">↓</text:span></text:p>
      <text:p text:style-name="PreformattedText"/>
      <text:p text:style-name="PreformattedText"><text:span text:style-name="SourceText">Train</text:span></text:p>
      <text:p text:style-name="PreformattedText"/>
      <text:p text:style-name="PreformattedText"><text:span text:style-name="SourceText">↓</text:span></text:p>
      <text:p text:style-name="PreformattedText"/>
      <text:p text:style-name="P113"><text:span text:style-name="SourceText">Forecast mới</text:span></text:p>
      <text:h text:style-name="Heading3" text:outline-level="3">Bỏ.</text:h>
      <text:p text:style-name="Textbody">Lý do:</text:p>
      <text:p text:style-name="Textbody">Bạn sẽ không thể vượt Open-Meteo hay ECMWF chỉ trong 48 giờ.</text:p>
      <text:h text:style-name="Heading2" text:outline-level="2">2. AI Downscaling</text:h>
      <text:p text:style-name="PreformattedText"><text:span text:style-name="SourceText">Forecast</text:span></text:p>
      <text:p text:style-name="PreformattedText"/>
      <text:p text:style-name="PreformattedText"><text:span text:style-name="SourceText">↓</text:span></text:p>
      <text:p text:style-name="PreformattedText"/>
      <text:p text:style-name="PreformattedText"><text:span text:style-name="SourceText">DEM</text:span></text:p>
      <text:p text:style-name="PreformattedText"/>
      <text:p text:style-name="PreformattedText"><text:span text:style-name="SourceText">↓</text:span></text:p>
      <text:p text:style-name="PreformattedText"/>
      <text:p text:style-name="P114"><text:span text:style-name="SourceText">Downscale</text:span></text:p>
      <text:h text:style-name="Heading3" text:outline-level="3">Bỏ.</text:h>
      <text:p text:style-name="Textbody">Lý do:</text:p>
      <text:p text:style-name="Textbody">Đây là đề tài nghiên cứu riêng.</text:p>
      <text:h text:style-name="Heading2" text:outline-level="2">3. AI sinh bản tin</text:h>
      <text:p text:style-name="PreformattedText"><text:span text:style-name="SourceText">Warning</text:span></text:p>
      <text:p text:style-name="PreformattedText"/>
      <text:p text:style-name="PreformattedText"><text:span text:style-name="SourceText">↓</text:span></text:p>
      <text:p text:style-name="PreformattedText"/>
      <text:p text:style-name="PreformattedText"><text:span text:style-name="SourceText">LLM</text:span></text:p>
      <text:p text:style-name="PreformattedText"/>
      <text:p text:style-name="PreformattedText"><text:span text:style-name="SourceText">↓</text:span></text:p>
      <text:p text:style-name="PreformattedText"/>
      <text:p text:style-name="P115"><text:span text:style-name="SourceText">"Bản tin..."</text:span></text:p>
      <text:soft-page-break/>
      <text:h text:style-name="Heading3" text:outline-level="3">Giữ.</text:h>
      <text:p text:style-name="Textbody">Đây là AI mà người xem<text:s/><text:span text:style-name="StrongEmphasis">nhìn thấy ngay</text:span>.</text:p>
      <text:h text:style-name="Heading1" text:outline-level="1">Cái AI nên giữ</text:h>
      <text:p text:style-name="Textbody">Mình sẽ chỉ giữ đúng một AI.</text:p>
      <text:p text:style-name="PreformattedText"><text:span text:style-name="SourceText">Forecast</text:span></text:p>
      <text:p text:style-name="PreformattedText"/>
      <text:p text:style-name="PreformattedText"><text:span text:style-name="SourceText">↓</text:span></text:p>
      <text:p text:style-name="PreformattedText"/>
      <text:p text:style-name="PreformattedText"><text:span text:style-name="SourceText">Rule Engine</text:span></text:p>
      <text:p text:style-name="PreformattedText"/>
      <text:p text:style-name="PreformattedText"><text:span text:style-name="SourceText">↓</text:span></text:p>
      <text:p text:style-name="PreformattedText"/>
      <text:p text:style-name="PreformattedText"><text:span text:style-name="SourceText">GPT</text:span></text:p>
      <text:p text:style-name="PreformattedText"/>
      <text:p text:style-name="PreformattedText"><text:span text:style-name="SourceText">↓</text:span></text:p>
      <text:p text:style-name="PreformattedText"/>
      <text:p text:style-name="P116"><text:span text:style-name="SourceText">Bản tin</text:span></text:p>
      <text:p text:style-name="Textbody">Ví dụ</text:p>
      <text:p text:style-name="PreformattedText"><text:span text:style-name="SourceText">Mường Chà</text:span></text:p>
      <text:p text:style-name="PreformattedText"/>
      <text:p text:style-name="PreformattedText"><text:span text:style-name="SourceText">Mưa 80 mm</text:span></text:p>
      <text:p text:style-name="PreformattedText"/>
      <text:p text:style-name="PreformattedText"><text:span text:style-name="SourceText">↓</text:span></text:p>
      <text:p text:style-name="PreformattedText"/>
      <text:p text:style-name="PreformattedText"><text:span text:style-name="SourceText">Warning Orange</text:span></text:p>
      <text:p text:style-name="PreformattedText"/>
      <text:p text:style-name="PreformattedText"><text:span text:style-name="SourceText">↓</text:span></text:p>
      <text:p text:style-name="PreformattedText"/>
      <text:p text:style-name="PreformattedText"><text:span text:style-name="SourceText">GPT</text:span></text:p>
      <text:p text:style-name="PreformattedText"/>
      <text:p text:style-name="PreformattedText"><text:span text:style-name="SourceText">↓</text:span></text:p>
      <text:p text:style-name="PreformattedText"/>
      <text:p text:style-name="PreformattedText"><text:span text:style-name="SourceText">"Từ chiều tối nay...</text:span></text:p>
      <text:p text:style-name="P117"><text:span text:style-name="SourceText">Người dân nên hạn chế qua suối..."</text:span></text:p>
      <text:p text:style-name="Textbody">Đây là AI.</text:p>
      <text:p text:style-name="Textbody">Đây là giá trị.</text:p>
      <text:p text:style-name="Textbody">Đây là demo.</text:p>
      <text:h text:style-name="Heading1" text:outline-level="1">Cái AI nên bỏ</text:h>
      <text:p text:style-name="Textbody">Bỏ hết</text:p>
      <text:p text:style-name="PreformattedText"><text:span text:style-name="SourceText">train.py</text:span></text:p>
      <text:p text:style-name="PreformattedText"/>
      <text:p text:style-name="PreformattedText"><text:span text:style-name="SourceText">train_flood.py</text:span></text:p>
      <text:p text:style-name="PreformattedText"/>
      <text:p text:style-name="PreformattedText"><text:span text:style-name="SourceText">downscale.py</text:span></text:p>
      <text:p text:style-name="PreformattedText"/>
      <text:p text:style-name="PreformattedText"><text:span text:style-name="SourceText">feature engineering</text:span></text:p>
      <text:p text:style-name="PreformattedText"/>
      <text:p text:style-name="PreformattedText"><text:span text:style-name="SourceText">LSTM</text:span></text:p>
      <text:p text:style-name="PreformattedText"/>
      <text:p text:style-name="PreformattedText"><text:span text:style-name="SourceText">XGBoost</text:span></text:p>
      <text:p text:style-name="PreformattedText"/>
      <text:p text:style-name="P118"><text:span text:style-name="SourceText">CatBoost</text:span></text:p>
      <text:p text:style-name="Textbody">Đưa sang Roadmap.</text:p>
      <text:h text:style-name="Heading1" text:outline-level="1">Nếu là mình</text:h>
      <text:p text:style-name="Textbody">Mình sẽ đổi luôn kiến trúc.</text:p>
      <text:h text:style-name="Heading2" text:outline-level="2">Hiện tại</text:h>
      <text:p text:style-name="PreformattedText"><text:span text:style-name="SourceText">Forecast</text:span></text:p>
      <text:p text:style-name="PreformattedText"/>
      <text:p text:style-name="PreformattedText"><text:span text:style-name="SourceText">↓</text:span></text:p>
      <text:p text:style-name="PreformattedText"/>
      <text:p text:style-name="PreformattedText"><text:span text:style-name="SourceText">AI</text:span></text:p>
      <text:p text:style-name="PreformattedText"/>
      <text:p text:style-name="PreformattedText"><text:span text:style-name="SourceText">↓</text:span></text:p>
      <text:p text:style-name="PreformattedText"/>
      <text:p text:style-name="PreformattedText"><text:span text:style-name="SourceText">Forecast</text:span></text:p>
      <text:p text:style-name="PreformattedText"/>
      <text:p text:style-name="PreformattedText"><text:span text:style-name="SourceText">↓</text:span></text:p>
      <text:p text:style-name="PreformattedText"/>
      <text:p text:style-name="PreformattedText"><text:span text:style-name="SourceText">AI</text:span></text:p>
      <text:p text:style-name="PreformattedText"/>
      <text:p text:style-name="PreformattedText"><text:span text:style-name="SourceText">↓</text:span></text:p>
      <text:p text:style-name="PreformattedText"/>
      <text:p text:style-name="P119"><text:span text:style-name="SourceText">Warning</text:span></text:p>
      <text:h text:style-name="Heading2" text:outline-level="2">Đổi thành</text:h>
      <text:p text:style-name="PreformattedText"><text:span text:style-name="SourceText">Open-Meteo</text:span></text:p>
      <text:p text:style-name="PreformattedText"><text:span text:style-name="SourceText"><text:s text:c="6"/>│</text:span></text:p>
      <text:p text:style-name="PreformattedText"><text:span text:style-name="SourceText"><text:s text:c="6"/>▼</text:span></text:p>
      <text:p text:style-name="PreformattedText"><text:span text:style-name="SourceText">Normalize</text:span></text:p>
      <text:p text:style-name="PreformattedText"><text:span text:style-name="SourceText"><text:s text:c="6"/>│</text:span></text:p>
      <text:p text:style-name="PreformattedText"><text:span text:style-name="SourceText"><text:s text:c="6"/>▼</text:span></text:p>
      <text:p text:style-name="PreformattedText"><text:span text:style-name="SourceText">Rule Engine</text:span></text:p>
      <text:p text:style-name="PreformattedText"><text:span text:style-name="SourceText"><text:s text:c="6"/>│</text:span></text:p>
      <text:p text:style-name="PreformattedText"><text:span text:style-name="SourceText"><text:s text:c="6"/>▼</text:span></text:p>
      <text:p text:style-name="PreformattedText"><text:span text:style-name="SourceText">LLM</text:span></text:p>
      <text:p text:style-name="PreformattedText"><text:span text:style-name="SourceText"><text:s text:c="6"/>│</text:span></text:p>
      <text:p text:style-name="PreformattedText"><text:span text:style-name="SourceText"><text:s text:c="6"/>▼</text:span></text:p>
      <text:p text:style-name="P120"><text:span text:style-name="SourceText">Dashboard</text:span></text:p>
      <text:p text:style-name="Textbody">Project nhỏ đi khoảng<text:s/><text:span text:style-name="StrongEmphasis">40%</text:span>.</text:p>
      <text:h text:style-name="Heading1" text:outline-level="1">Rule Engine có đủ không?</text:h>
      <text:p text:style-name="Textbody">Có.</text:p>
      <text:p text:style-name="Textbody">Ví dụ</text:p>
      <text:soft-page-break/>
      <text:p text:style-name="PreformattedText"><text:span text:style-name="SourceText">if rain &gt;= 100:</text:span></text:p>
      <text:p text:style-name="PreformattedText"><text:span text:style-name="SourceText"><text:s text:c="4"/>level = "RED"</text:span></text:p>
      <text:p text:style-name="PreformattedText"/>
      <text:p text:style-name="PreformattedText"><text:span text:style-name="SourceText">elif rain &gt;= 50:</text:span></text:p>
      <text:p text:style-name="PreformattedText"><text:span text:style-name="SourceText"><text:s text:c="4"/>level = "ORANGE"</text:span></text:p>
      <text:p text:style-name="PreformattedText"/>
      <text:p text:style-name="PreformattedText"><text:span text:style-name="SourceText">elif rain &gt;= 20:</text:span></text:p>
      <text:p text:style-name="PreformattedText"><text:span text:style-name="SourceText"><text:s text:c="4"/>level = "YELLOW"</text:span></text:p>
      <text:p text:style-name="PreformattedText"/>
      <text:p text:style-name="PreformattedText"><text:span text:style-name="SourceText">else:</text:span></text:p>
      <text:p text:style-name="P121"><text:span text:style-name="SourceText"><text:s text:c="4"/>level = "GREEN"</text:span></text:p>
      <text:p text:style-name="Textbody">Sau đó</text:p>
      <text:p text:style-name="PreformattedText"><text:span text:style-name="SourceText">Level</text:span></text:p>
      <text:p text:style-name="PreformattedText"/>
      <text:p text:style-name="PreformattedText"><text:span text:style-name="SourceText">↓</text:span></text:p>
      <text:p text:style-name="PreformattedText"/>
      <text:p text:style-name="PreformattedText"><text:span text:style-name="SourceText">GPT</text:span></text:p>
      <text:p text:style-name="PreformattedText"/>
      <text:p text:style-name="PreformattedText"><text:span text:style-name="SourceText">↓</text:span></text:p>
      <text:p text:style-name="PreformattedText"/>
      <text:p text:style-name="P122"><text:span text:style-name="SourceText">Khuyến nghị</text:span></text:p>
      <text:p text:style-name="Textbody">Là đủ.</text:p>
      <text:h text:style-name="Heading1" text:outline-level="1">Cái gì tuyệt đối KHÔNG được làm</text:h>
      <text:p text:style-name="Textbody">Đừng ngồi train model.</text:p>
      <text:p text:style-name="Textbody">Ví dụ</text:p>
      <text:p text:style-name="P123"><text:span text:style-name="SourceText">python train.py</text:span></text:p>
      <text:p text:style-name="Textbody">Nếu mất</text:p>
      <text:p text:style-name="Textbody">6 tiếng</text:p>
      <text:p text:style-name="Textbody">↓</text:p>
      <text:p text:style-name="Textbody">được giảm</text:p>
      <text:p text:style-name="Textbody">RMSE</text:p>
      <text:p text:style-name="Textbody">2%</text:p>
      <text:p text:style-name="Textbody">↓</text:p>
      <text:p text:style-name="Textbody">mentor cũng không quan tâm.</text:p>
      <text:p text:style-name="Textbody">Trong khi dashboard chưa chạy.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Lân Lê Hoàng</meta:initial-creator>
    <dc:creator>Lân Lê Hoàng</dc:creator>
    <meta:creation-date>2026-07-18T06:37:00Z</meta:creation-date>
    <dc:date>2026-07-18T06:37:00Z</dc:date>
    <meta:template xlink:href="Normal.dotm" xlink:type="simple"/>
    <meta:editing-cycles>2</meta:editing-cycles>
    <meta:editing-duration>PT1020S</meta:editing-duration>
    <meta:document-statistic meta:page-count="21" meta:paragraph-count="20" meta:word-count="1532" meta:character-count="10251" meta:row-count="72" meta:non-whitespace-character-count="8739"/>
  </office:meta>
</office:document-meta>
</file>